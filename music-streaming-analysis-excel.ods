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  <style:text-properties fo:color="#000000" style:font-name="Aptos Narrow" style:font-name-asian="Aptos Narrow" style:font-name-complex="Aptos Narrow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4C6E7" style:repeat-content="false"/>
      <style:paragraph-properties fo:text-align="center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1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3.12208333333333cm" style:use-optimal-column-width="true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5.10645833333333cm"/>
    </style:style>
    <style:style style:name="co16" style:family="table-column">
      <style:table-column-properties fo:break-before="auto" style:column-width="2.27541666666667cm" style:use-optimal-column-width="true"/>
    </style:style>
    <style:style style:name="co17" style:family="table-column">
      <style:table-column-properties fo:break-before="auto" style:column-width="2.06375cm" style:use-optimal-column-width="true"/>
    </style:style>
    <style:style style:name="co18" style:family="table-column">
      <style:table-column-properties fo:break-before="auto" style:column-width="2.460625cm" style:use-optimal-column-width="true"/>
    </style:style>
    <style:style style:name="co19" style:family="table-column">
      <style:table-column-properties fo:break-before="auto" style:column-width="1.031875cm" style:use-optimal-column-width="true"/>
    </style:style>
    <style:style style:name="co20" style:family="table-column">
      <style:table-column-properties fo:break-before="auto" style:column-width="6.77333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45.75pt" style:use-optimal-row-height="true" fo:break-before="auto"/>
    </style:style>
    <style:style style:name="ro5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user_id,age,country,subscription_type,device,daily_minutes,favorite_genre,skip_rate,ads_clicked,churne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1,22,TR,free,mobile,45,pop,0.35,1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2,30,DE,premium,desktop,120,rock,0.10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3,27,TR,free,mobile,30,hiphop,0.50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4,35,UK,premium,desktop,150,jazz,0.05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5,19,TR,free,mobile,25,pop,0.60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6,40,DE,premium,mobile,90,classical,0.15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7,28,FR,free,desktop,35,rock,0.45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8,31,TR,premium,mobile,110,pop,0.20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09,24,UK,free,mobile,40,hiphop,0.55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0,29,DE,premium,desktop,130,rock,0.08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1,33,TR,free,mobile,50,pop,0.30,1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2,26,FR,premium,desktop,140,jazz,0.12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3,21,TR,free,mobile,20,hiphop,0.65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4,37,UK,premium,desktop,160,classical,0.07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5,23,TR,free,mobile,38,pop,0.40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6,34,DE,premium,mobile,100,rock,0.18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7,28,TR,free,desktop,45,hiphop,0.50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8,41,FR,premium,desktop,155,jazz,0.09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19,25,UK,free,mobile,42,pop,0.48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0,32,TR,premium,mobile,115,rock,0.22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1,29,TR,free,mobile,33,pop,0.55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2,36,DE,premium,desktop,145,jazz,0.11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3,23,TR,free,mobile,28,hiphop,0.62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4,38,UK,premium,desktop,170,classical,0.06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5,27,TR,free,mobile,48,pop,0.37,1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6,42,FR,premium,mobile,95,rock,0.19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7,31,TR,free,desktop,36,hiphop,0.52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8,33,DE,premium,desktop,125,rock,0.09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29,22,TR,free,mobile,27,pop,0.58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0,35,UK,premium,mobile,135,jazz,0.13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1,26,TR,free,mobile,44,pop,,1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2,39,DE,premium,desktop,150,classical,0.07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3,24,TR,free,mobile,22,hiphop,0.68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4,41,FR,premium,desktop,165,jazz,0.10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5,28,TR,free,desktop,39,pop,0.43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6,37,UK,premium,mobile,118,rock,0.17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7,23,TR,free,mobile,31,pop,0.60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8,34,DE,premium,desktop,142,jazz,0.12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39,29,TR,free,mobile,46,hiphop,0.49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0,40,FR,premium,mobile,105,classical,0.14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1,21,TR,free,mobile,19,pop,0.70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2,36,UK,premium,desktop,155,rock,0.08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3,27,TR,free,mobile,34,hiphop,0.57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4,38,DE,premium,mobile,120,jazz,0.11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5,25,TR,free,desktop,41,pop,0.46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6,43,FR,premium,desktop,175,classical,0.05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7,30,TR,free,mobile,37,hiphop,0.54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8,35,UK,premium,mobile,130,rock,0.16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49,22,TR,free,mobile,26,pop,0.61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0,39,DE,premium,desktop,148,jazz,0.09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1,28,TR,free,mobile,43,pop,0.44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2,41,FR,premium,desktop,160,classical,0.06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3,24,TR,free,mobile,21,hiphop,0.69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4,37,UK,premium,mobile,122,rock,0.18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5,26,TR,free,desktop,40,pop,0.47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6,42,DE,premium,desktop,155,jazz,0.10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7,29,TR,free,mobile,35,hiphop,0.53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8,38,FR,premium,mobile,110,classical,0.13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59,23,TR,free,mobile,29,pop,0.59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0,40,UK,premium,desktop,165,rock,0.07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1,27,TR,free,mobile,32,hiphop,0.56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2,36,DE,premium,mobile,140,jazz,0.12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3,25,TR,free,desktop,42,pop,0.45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4,44,FR,premium,desktop,180,classical,0.04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5,22,TR,free,mobile,400,pop,0.20,1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6,31,UK,premium,mobile,115,rock,0.21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7,28,TR,free,mobile,38,hiphop,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8,39,DE,premium,desktop,150,jazz,0.10,0,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69,24,TR,free,mobile,23,pop,0.66,1,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070,41,FR,premium,mobile,105,classical,0.14,0,1</text:p>
          </table:table-cell>
          <table:table-cell table:number-columns-repeated="16383"/>
        </table:table-row>
        <table:table-row table:number-rows-repeated="1048505" table:style-name="ro2">
          <table:table-cell table:number-columns-repeated="16384"/>
        </table:table-row>
      </table:table>
      <table:table table:name="cleandata" table:style-name="ta1">
        <table:table-column table:style-name="co2" table:default-cell-style-name="ce7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1" table:number-columns-repeated="16372" table:default-cell-style-name="ce1"/>
        <table:table-row table:style-name="ro1">
          <table:table-cell office:value-type="string" table:style-name="ce5">
            <text:p>user_id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age_category</text:p>
          </table:table-cell>
          <table:table-cell office:value-type="string" table:style-name="ce3">
            <text:p>age_category2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subscription_type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daily_minutes</text:p>
          </table:table-cell>
          <table:table-cell office:value-type="string" table:style-name="ce3">
            <text:p>favorite_genre</text:p>
          </table:table-cell>
          <table:table-cell office:value-type="string" table:style-name="ce3">
            <text:p>skip_rate</text:p>
          </table:table-cell>
          <table:table-cell office:value-type="string" table:style-name="ce3">
            <text:p>ads_clicked</text:p>
          </table:table-cell>
          <table:table-cell office:value-type="string" table:style-name="ce3">
            <text:p>churned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1</text:p>
          </table:table-cell>
          <table:table-cell office:value-type="float" office:value="22" table:style-name="ce4">
            <text:p>22</text:p>
          </table:table-cell>
          <table:table-cell office:value-type="string" office:string-value="Young" table:formula="of:=IF([.B2]&lt;=24;&quot;Young&quot;;IF([.B2]&lt;=34;&quot;Adult&quot;;&quot;Middle-Aged&quot;))" table:style-name="ce4">
            <text:p>Young</text:p>
          </table:table-cell>
          <table:table-cell office:value-type="string" office:string-value="18-24" table:formula="of:=IF([.B2]&lt;=24;&quot;18-24&quot;;IF([.B2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3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2</text:p>
          </table:table-cell>
          <table:table-cell office:value-type="float" office:value="30" table:style-name="ce4">
            <text:p>30</text:p>
          </table:table-cell>
          <table:table-cell office:value-type="string" office:string-value="Adult" table:formula="of:=IF([.B3]&lt;=24;&quot;Young&quot;;IF([.B3]&lt;=34;&quot;Adult&quot;;&quot;Middle-Aged&quot;))" table:style-name="ce4">
            <text:p>Adult</text:p>
          </table:table-cell>
          <table:table-cell office:value-type="string" office:string-value="25-34" table:formula="of:=IF([.B3]&lt;=24;&quot;18-24&quot;;IF([.B3]&lt;=34;&quot;25-34&quot;;&quot;35+&quot;))" table:style-name="ce4">
            <text:p>25-34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3</text:p>
          </table:table-cell>
          <table:table-cell office:value-type="float" office:value="27" table:style-name="ce4">
            <text:p>27</text:p>
          </table:table-cell>
          <table:table-cell office:value-type="string" office:string-value="Adult" table:formula="of:=IF([.B4]&lt;=24;&quot;Young&quot;;IF([.B4]&lt;=34;&quot;Adult&quot;;&quot;Middle-Aged&quot;))" table:style-name="ce4">
            <text:p>Adult</text:p>
          </table:table-cell>
          <table:table-cell office:value-type="string" office:string-value="25-34" table:formula="of:=IF([.B4]&lt;=24;&quot;18-24&quot;;IF([.B4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4</text:p>
          </table:table-cell>
          <table:table-cell office:value-type="float" office:value="35" table:style-name="ce4">
            <text:p>35</text:p>
          </table:table-cell>
          <table:table-cell office:value-type="string" office:string-value="Middle-Aged" table:formula="of:=IF([.B5]&lt;=24;&quot;Young&quot;;IF([.B5]&lt;=34;&quot;Adult&quot;;&quot;Middle-Aged&quot;))" table:style-name="ce4">
            <text:p>Middle-Aged</text:p>
          </table:table-cell>
          <table:table-cell office:value-type="string" office:string-value="35+" table:formula="of:=IF([.B5]&lt;=24;&quot;18-24&quot;;IF([.B5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5</text:p>
          </table:table-cell>
          <table:table-cell office:value-type="float" office:value="19" table:style-name="ce4">
            <text:p>19</text:p>
          </table:table-cell>
          <table:table-cell office:value-type="string" office:string-value="Young" table:formula="of:=IF([.B6]&lt;=24;&quot;Young&quot;;IF([.B6]&lt;=34;&quot;Adult&quot;;&quot;Middle-Aged&quot;))" table:style-name="ce4">
            <text:p>Young</text:p>
          </table:table-cell>
          <table:table-cell office:value-type="string" office:string-value="18-24" table:formula="of:=IF([.B6]&lt;=24;&quot;18-24&quot;;IF([.B6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6</text:p>
          </table:table-cell>
          <table:table-cell office:value-type="float" office:value="40" table:style-name="ce4">
            <text:p>40</text:p>
          </table:table-cell>
          <table:table-cell office:value-type="string" office:string-value="Middle-Aged" table:formula="of:=IF([.B7]&lt;=24;&quot;Young&quot;;IF([.B7]&lt;=34;&quot;Adult&quot;;&quot;Middle-Aged&quot;))" table:style-name="ce4">
            <text:p>Middle-Aged</text:p>
          </table:table-cell>
          <table:table-cell office:value-type="string" office:string-value="35+" table:formula="of:=IF([.B7]&lt;=24;&quot;18-24&quot;;IF([.B7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7</text:p>
          </table:table-cell>
          <table:table-cell office:value-type="float" office:value="28" table:style-name="ce4">
            <text:p>28</text:p>
          </table:table-cell>
          <table:table-cell office:value-type="string" office:string-value="Adult" table:formula="of:=IF([.B8]&lt;=24;&quot;Young&quot;;IF([.B8]&lt;=34;&quot;Adult&quot;;&quot;Middle-Aged&quot;))" table:style-name="ce4">
            <text:p>Adult</text:p>
          </table:table-cell>
          <table:table-cell office:value-type="string" office:string-value="25-34" table:formula="of:=IF([.B8]&lt;=24;&quot;18-24&quot;;IF([.B8]&lt;=34;&quot;25-34&quot;;&quot;35+&quot;))" table:style-name="ce4">
            <text:p>25-34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8</text:p>
          </table:table-cell>
          <table:table-cell office:value-type="float" office:value="31" table:style-name="ce4">
            <text:p>31</text:p>
          </table:table-cell>
          <table:table-cell office:value-type="string" office:string-value="Adult" table:formula="of:=IF([.B9]&lt;=24;&quot;Young&quot;;IF([.B9]&lt;=34;&quot;Adult&quot;;&quot;Middle-Aged&quot;))" table:style-name="ce4">
            <text:p>Adult</text:p>
          </table:table-cell>
          <table:table-cell office:value-type="string" office:string-value="25-34" table:formula="of:=IF([.B9]&lt;=24;&quot;18-24&quot;;IF([.B9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10" table:style-name="ce4">
            <text:p>110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09</text:p>
          </table:table-cell>
          <table:table-cell office:value-type="float" office:value="24" table:style-name="ce4">
            <text:p>24</text:p>
          </table:table-cell>
          <table:table-cell office:value-type="string" office:string-value="Young" table:formula="of:=IF([.B10]&lt;=24;&quot;Young&quot;;IF([.B10]&lt;=34;&quot;Adult&quot;;&quot;Middle-Aged&quot;))" table:style-name="ce4">
            <text:p>Young</text:p>
          </table:table-cell>
          <table:table-cell office:value-type="string" office:string-value="18-24" table:formula="of:=IF([.B10]&lt;=24;&quot;18-24&quot;;IF([.B10]&lt;=34;&quot;25-34&quot;;&quot;35+&quot;))" table:style-name="ce4">
            <text:p>18-24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0</text:p>
          </table:table-cell>
          <table:table-cell office:value-type="float" office:value="29" table:style-name="ce4">
            <text:p>29</text:p>
          </table:table-cell>
          <table:table-cell office:value-type="string" office:string-value="Adult" table:formula="of:=IF([.B11]&lt;=24;&quot;Young&quot;;IF([.B11]&lt;=34;&quot;Adult&quot;;&quot;Middle-Aged&quot;))" table:style-name="ce4">
            <text:p>Adult</text:p>
          </table:table-cell>
          <table:table-cell office:value-type="string" office:string-value="25-34" table:formula="of:=IF([.B11]&lt;=24;&quot;18-24&quot;;IF([.B11]&lt;=34;&quot;25-34&quot;;&quot;35+&quot;))" table:style-name="ce4">
            <text:p>25-34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1</text:p>
          </table:table-cell>
          <table:table-cell office:value-type="float" office:value="33" table:style-name="ce4">
            <text:p>33</text:p>
          </table:table-cell>
          <table:table-cell office:value-type="string" office:string-value="Adult" table:formula="of:=IF([.B12]&lt;=24;&quot;Young&quot;;IF([.B12]&lt;=34;&quot;Adult&quot;;&quot;Middle-Aged&quot;))" table:style-name="ce4">
            <text:p>Adult</text:p>
          </table:table-cell>
          <table:table-cell office:value-type="string" office:string-value="25-34" table:formula="of:=IF([.B12]&lt;=24;&quot;18-24&quot;;IF([.B12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3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2</text:p>
          </table:table-cell>
          <table:table-cell office:value-type="float" office:value="26" table:style-name="ce4">
            <text:p>26</text:p>
          </table:table-cell>
          <table:table-cell office:value-type="string" office:string-value="Adult" table:formula="of:=IF([.B13]&lt;=24;&quot;Young&quot;;IF([.B13]&lt;=34;&quot;Adult&quot;;&quot;Middle-Aged&quot;))" table:style-name="ce4">
            <text:p>Adult</text:p>
          </table:table-cell>
          <table:table-cell office:value-type="string" office:string-value="25-34" table:formula="of:=IF([.B13]&lt;=24;&quot;18-24&quot;;IF([.B13]&lt;=34;&quot;25-34&quot;;&quot;35+&quot;))" table:style-name="ce4">
            <text:p>25-34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3</text:p>
          </table:table-cell>
          <table:table-cell office:value-type="float" office:value="21" table:style-name="ce4">
            <text:p>21</text:p>
          </table:table-cell>
          <table:table-cell office:value-type="string" office:string-value="Young" table:formula="of:=IF([.B14]&lt;=24;&quot;Young&quot;;IF([.B14]&lt;=34;&quot;Adult&quot;;&quot;Middle-Aged&quot;))" table:style-name="ce4">
            <text:p>Young</text:p>
          </table:table-cell>
          <table:table-cell office:value-type="string" office:string-value="18-24" table:formula="of:=IF([.B14]&lt;=24;&quot;18-24&quot;;IF([.B14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4</text:p>
          </table:table-cell>
          <table:table-cell office:value-type="float" office:value="37" table:style-name="ce4">
            <text:p>37</text:p>
          </table:table-cell>
          <table:table-cell office:value-type="string" office:string-value="Middle-Aged" table:formula="of:=IF([.B15]&lt;=24;&quot;Young&quot;;IF([.B15]&lt;=34;&quot;Adult&quot;;&quot;Middle-Aged&quot;))" table:style-name="ce4">
            <text:p>Middle-Aged</text:p>
          </table:table-cell>
          <table:table-cell office:value-type="string" office:string-value="35+" table:formula="of:=IF([.B15]&lt;=24;&quot;18-24&quot;;IF([.B15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60" table:style-name="ce4">
            <text:p>16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5</text:p>
          </table:table-cell>
          <table:table-cell office:value-type="float" office:value="23" table:style-name="ce4">
            <text:p>23</text:p>
          </table:table-cell>
          <table:table-cell office:value-type="string" office:string-value="Young" table:formula="of:=IF([.B16]&lt;=24;&quot;Young&quot;;IF([.B16]&lt;=34;&quot;Adult&quot;;&quot;Middle-Aged&quot;))" table:style-name="ce4">
            <text:p>Young</text:p>
          </table:table-cell>
          <table:table-cell office:value-type="string" office:string-value="18-24" table:formula="of:=IF([.B16]&lt;=24;&quot;18-24&quot;;IF([.B16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6</text:p>
          </table:table-cell>
          <table:table-cell office:value-type="float" office:value="34" table:style-name="ce4">
            <text:p>34</text:p>
          </table:table-cell>
          <table:table-cell office:value-type="string" office:string-value="Adult" table:formula="of:=IF([.B17]&lt;=24;&quot;Young&quot;;IF([.B17]&lt;=34;&quot;Adult&quot;;&quot;Middle-Aged&quot;))" table:style-name="ce4">
            <text:p>Adult</text:p>
          </table:table-cell>
          <table:table-cell office:value-type="string" office:string-value="25-34" table:formula="of:=IF([.B17]&lt;=24;&quot;18-24&quot;;IF([.B17]&lt;=34;&quot;25-34&quot;;&quot;35+&quot;))" table:style-name="ce4">
            <text:p>25-34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7</text:p>
          </table:table-cell>
          <table:table-cell office:value-type="float" office:value="28" table:style-name="ce4">
            <text:p>28</text:p>
          </table:table-cell>
          <table:table-cell office:value-type="string" office:string-value="Adult" table:formula="of:=IF([.B18]&lt;=24;&quot;Young&quot;;IF([.B18]&lt;=34;&quot;Adult&quot;;&quot;Middle-Aged&quot;))" table:style-name="ce4">
            <text:p>Adult</text:p>
          </table:table-cell>
          <table:table-cell office:value-type="string" office:string-value="25-34" table:formula="of:=IF([.B18]&lt;=24;&quot;18-24&quot;;IF([.B18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8</text:p>
          </table:table-cell>
          <table:table-cell office:value-type="float" office:value="41" table:style-name="ce4">
            <text:p>41</text:p>
          </table:table-cell>
          <table:table-cell office:value-type="string" office:string-value="Middle-Aged" table:formula="of:=IF([.B19]&lt;=24;&quot;Young&quot;;IF([.B19]&lt;=34;&quot;Adult&quot;;&quot;Middle-Aged&quot;))" table:style-name="ce4">
            <text:p>Middle-Aged</text:p>
          </table:table-cell>
          <table:table-cell office:value-type="string" office:string-value="35+" table:formula="of:=IF([.B19]&lt;=24;&quot;18-24&quot;;IF([.B19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55" table:style-name="ce4">
            <text:p>155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19</text:p>
          </table:table-cell>
          <table:table-cell office:value-type="float" office:value="25" table:style-name="ce4">
            <text:p>25</text:p>
          </table:table-cell>
          <table:table-cell office:value-type="string" office:string-value="Adult" table:formula="of:=IF([.B20]&lt;=24;&quot;Young&quot;;IF([.B20]&lt;=34;&quot;Adult&quot;;&quot;Middle-Aged&quot;))" table:style-name="ce4">
            <text:p>Adult</text:p>
          </table:table-cell>
          <table:table-cell office:value-type="string" office:string-value="25-34" table:formula="of:=IF([.B20]&lt;=24;&quot;18-24&quot;;IF([.B20]&lt;=34;&quot;25-34&quot;;&quot;35+&quot;))" table:style-name="ce4">
            <text:p>25-34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0</text:p>
          </table:table-cell>
          <table:table-cell office:value-type="float" office:value="32" table:style-name="ce4">
            <text:p>32</text:p>
          </table:table-cell>
          <table:table-cell office:value-type="string" office:string-value="Adult" table:formula="of:=IF([.B21]&lt;=24;&quot;Young&quot;;IF([.B21]&lt;=34;&quot;Adult&quot;;&quot;Middle-Aged&quot;))" table:style-name="ce4">
            <text:p>Adult</text:p>
          </table:table-cell>
          <table:table-cell office:value-type="string" office:string-value="25-34" table:formula="of:=IF([.B21]&lt;=24;&quot;18-24&quot;;IF([.B21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1</text:p>
          </table:table-cell>
          <table:table-cell office:value-type="float" office:value="29" table:style-name="ce4">
            <text:p>29</text:p>
          </table:table-cell>
          <table:table-cell office:value-type="string" office:string-value="Adult" table:formula="of:=IF([.B22]&lt;=24;&quot;Young&quot;;IF([.B22]&lt;=34;&quot;Adult&quot;;&quot;Middle-Aged&quot;))" table:style-name="ce4">
            <text:p>Adult</text:p>
          </table:table-cell>
          <table:table-cell office:value-type="string" office:string-value="25-34" table:formula="of:=IF([.B22]&lt;=24;&quot;18-24&quot;;IF([.B22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2</text:p>
          </table:table-cell>
          <table:table-cell office:value-type="float" office:value="36" table:style-name="ce4">
            <text:p>36</text:p>
          </table:table-cell>
          <table:table-cell office:value-type="string" office:string-value="Middle-Aged" table:formula="of:=IF([.B23]&lt;=24;&quot;Young&quot;;IF([.B23]&lt;=34;&quot;Adult&quot;;&quot;Middle-Aged&quot;))" table:style-name="ce4">
            <text:p>Middle-Aged</text:p>
          </table:table-cell>
          <table:table-cell office:value-type="string" office:string-value="35+" table:formula="of:=IF([.B23]&lt;=24;&quot;18-24&quot;;IF([.B23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45" table:style-name="ce4">
            <text:p>145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3</text:p>
          </table:table-cell>
          <table:table-cell office:value-type="float" office:value="23" table:style-name="ce4">
            <text:p>23</text:p>
          </table:table-cell>
          <table:table-cell office:value-type="string" office:string-value="Young" table:formula="of:=IF([.B24]&lt;=24;&quot;Young&quot;;IF([.B24]&lt;=34;&quot;Adult&quot;;&quot;Middle-Aged&quot;))" table:style-name="ce4">
            <text:p>Young</text:p>
          </table:table-cell>
          <table:table-cell office:value-type="string" office:string-value="18-24" table:formula="of:=IF([.B24]&lt;=24;&quot;18-24&quot;;IF([.B24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4</text:p>
          </table:table-cell>
          <table:table-cell office:value-type="float" office:value="38" table:style-name="ce4">
            <text:p>38</text:p>
          </table:table-cell>
          <table:table-cell office:value-type="string" office:string-value="Middle-Aged" table:formula="of:=IF([.B25]&lt;=24;&quot;Young&quot;;IF([.B25]&lt;=34;&quot;Adult&quot;;&quot;Middle-Aged&quot;))" table:style-name="ce4">
            <text:p>Middle-Aged</text:p>
          </table:table-cell>
          <table:table-cell office:value-type="string" office:string-value="35+" table:formula="of:=IF([.B25]&lt;=24;&quot;18-24&quot;;IF([.B25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70" table:style-name="ce4">
            <text:p>17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5</text:p>
          </table:table-cell>
          <table:table-cell office:value-type="float" office:value="27" table:style-name="ce4">
            <text:p>27</text:p>
          </table:table-cell>
          <table:table-cell office:value-type="string" office:string-value="Adult" table:formula="of:=IF([.B26]&lt;=24;&quot;Young&quot;;IF([.B26]&lt;=34;&quot;Adult&quot;;&quot;Middle-Aged&quot;))" table:style-name="ce4">
            <text:p>Adult</text:p>
          </table:table-cell>
          <table:table-cell office:value-type="string" office:string-value="25-34" table:formula="of:=IF([.B26]&lt;=24;&quot;18-24&quot;;IF([.B26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3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6</text:p>
          </table:table-cell>
          <table:table-cell office:value-type="float" office:value="42" table:style-name="ce4">
            <text:p>42</text:p>
          </table:table-cell>
          <table:table-cell office:value-type="string" office:string-value="Middle-Aged" table:formula="of:=IF([.B27]&lt;=24;&quot;Young&quot;;IF([.B27]&lt;=34;&quot;Adult&quot;;&quot;Middle-Aged&quot;))" table:style-name="ce4">
            <text:p>Middle-Aged</text:p>
          </table:table-cell>
          <table:table-cell office:value-type="string" office:string-value="35+" table:formula="of:=IF([.B27]&lt;=24;&quot;18-24&quot;;IF([.B27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95" table:style-name="ce4">
            <text:p>9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7</text:p>
          </table:table-cell>
          <table:table-cell office:value-type="float" office:value="31" table:style-name="ce4">
            <text:p>31</text:p>
          </table:table-cell>
          <table:table-cell office:value-type="string" office:string-value="Adult" table:formula="of:=IF([.B28]&lt;=24;&quot;Young&quot;;IF([.B28]&lt;=34;&quot;Adult&quot;;&quot;Middle-Aged&quot;))" table:style-name="ce4">
            <text:p>Adult</text:p>
          </table:table-cell>
          <table:table-cell office:value-type="string" office:string-value="25-34" table:formula="of:=IF([.B28]&lt;=24;&quot;18-24&quot;;IF([.B28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8</text:p>
          </table:table-cell>
          <table:table-cell office:value-type="float" office:value="33" table:style-name="ce4">
            <text:p>33</text:p>
          </table:table-cell>
          <table:table-cell office:value-type="string" office:string-value="Adult" table:formula="of:=IF([.B29]&lt;=24;&quot;Young&quot;;IF([.B29]&lt;=34;&quot;Adult&quot;;&quot;Middle-Aged&quot;))" table:style-name="ce4">
            <text:p>Adult</text:p>
          </table:table-cell>
          <table:table-cell office:value-type="string" office:string-value="25-34" table:formula="of:=IF([.B29]&lt;=24;&quot;18-24&quot;;IF([.B29]&lt;=34;&quot;25-34&quot;;&quot;35+&quot;))" table:style-name="ce4">
            <text:p>25-34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25" table:style-name="ce4">
            <text:p>12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29</text:p>
          </table:table-cell>
          <table:table-cell office:value-type="float" office:value="22" table:style-name="ce4">
            <text:p>22</text:p>
          </table:table-cell>
          <table:table-cell office:value-type="string" office:string-value="Young" table:formula="of:=IF([.B30]&lt;=24;&quot;Young&quot;;IF([.B30]&lt;=34;&quot;Adult&quot;;&quot;Middle-Aged&quot;))" table:style-name="ce4">
            <text:p>Young</text:p>
          </table:table-cell>
          <table:table-cell office:value-type="string" office:string-value="18-24" table:formula="of:=IF([.B30]&lt;=24;&quot;18-24&quot;;IF([.B30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0</text:p>
          </table:table-cell>
          <table:table-cell office:value-type="float" office:value="35" table:style-name="ce4">
            <text:p>35</text:p>
          </table:table-cell>
          <table:table-cell office:value-type="string" office:string-value="Middle-Aged" table:formula="of:=IF([.B31]&lt;=24;&quot;Young&quot;;IF([.B31]&lt;=34;&quot;Adult&quot;;&quot;Middle-Aged&quot;))" table:style-name="ce4">
            <text:p>Middle-Aged</text:p>
          </table:table-cell>
          <table:table-cell office:value-type="string" office:string-value="35+" table:formula="of:=IF([.B31]&lt;=24;&quot;18-24&quot;;IF([.B31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35" table:style-name="ce4">
            <text:p>135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1</text:p>
          </table:table-cell>
          <table:table-cell office:value-type="float" office:value="26" table:style-name="ce4">
            <text:p>26</text:p>
          </table:table-cell>
          <table:table-cell office:value-type="string" office:string-value="Adult" table:formula="of:=IF([.B32]&lt;=24;&quot;Young&quot;;IF([.B32]&lt;=34;&quot;Adult&quot;;&quot;Middle-Aged&quot;))" table:style-name="ce4">
            <text:p>Adult</text:p>
          </table:table-cell>
          <table:table-cell office:value-type="string" office:string-value="25-34" table:formula="of:=IF([.B32]&lt;=24;&quot;18-24&quot;;IF([.B32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pop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2</text:p>
          </table:table-cell>
          <table:table-cell office:value-type="float" office:value="39" table:style-name="ce4">
            <text:p>39</text:p>
          </table:table-cell>
          <table:table-cell office:value-type="string" office:string-value="Middle-Aged" table:formula="of:=IF([.B33]&lt;=24;&quot;Young&quot;;IF([.B33]&lt;=34;&quot;Adult&quot;;&quot;Middle-Aged&quot;))" table:style-name="ce4">
            <text:p>Middle-Aged</text:p>
          </table:table-cell>
          <table:table-cell office:value-type="string" office:string-value="35+" table:formula="of:=IF([.B33]&lt;=24;&quot;18-24&quot;;IF([.B33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3</text:p>
          </table:table-cell>
          <table:table-cell office:value-type="float" office:value="24" table:style-name="ce4">
            <text:p>24</text:p>
          </table:table-cell>
          <table:table-cell office:value-type="string" office:string-value="Young" table:formula="of:=IF([.B34]&lt;=24;&quot;Young&quot;;IF([.B34]&lt;=34;&quot;Adult&quot;;&quot;Middle-Aged&quot;))" table:style-name="ce4">
            <text:p>Young</text:p>
          </table:table-cell>
          <table:table-cell office:value-type="string" office:string-value="18-24" table:formula="of:=IF([.B34]&lt;=24;&quot;18-24&quot;;IF([.B34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4</text:p>
          </table:table-cell>
          <table:table-cell office:value-type="float" office:value="41" table:style-name="ce4">
            <text:p>41</text:p>
          </table:table-cell>
          <table:table-cell office:value-type="string" office:string-value="Middle-Aged" table:formula="of:=IF([.B35]&lt;=24;&quot;Young&quot;;IF([.B35]&lt;=34;&quot;Adult&quot;;&quot;Middle-Aged&quot;))" table:style-name="ce4">
            <text:p>Middle-Aged</text:p>
          </table:table-cell>
          <table:table-cell office:value-type="string" office:string-value="35+" table:formula="of:=IF([.B35]&lt;=24;&quot;18-24&quot;;IF([.B35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65" table:style-name="ce4">
            <text:p>165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5</text:p>
          </table:table-cell>
          <table:table-cell office:value-type="float" office:value="28" table:style-name="ce4">
            <text:p>28</text:p>
          </table:table-cell>
          <table:table-cell office:value-type="string" office:string-value="Adult" table:formula="of:=IF([.B36]&lt;=24;&quot;Young&quot;;IF([.B36]&lt;=34;&quot;Adult&quot;;&quot;Middle-Aged&quot;))" table:style-name="ce4">
            <text:p>Adult</text:p>
          </table:table-cell>
          <table:table-cell office:value-type="string" office:string-value="25-34" table:formula="of:=IF([.B36]&lt;=24;&quot;18-24&quot;;IF([.B36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6</text:p>
          </table:table-cell>
          <table:table-cell office:value-type="float" office:value="37" table:style-name="ce4">
            <text:p>37</text:p>
          </table:table-cell>
          <table:table-cell office:value-type="string" office:string-value="Middle-Aged" table:formula="of:=IF([.B37]&lt;=24;&quot;Young&quot;;IF([.B37]&lt;=34;&quot;Adult&quot;;&quot;Middle-Aged&quot;))" table:style-name="ce4">
            <text:p>Middle-Aged</text:p>
          </table:table-cell>
          <table:table-cell office:value-type="string" office:string-value="35+" table:formula="of:=IF([.B37]&lt;=24;&quot;18-24&quot;;IF([.B37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7</text:p>
          </table:table-cell>
          <table:table-cell office:value-type="float" office:value="23" table:style-name="ce4">
            <text:p>23</text:p>
          </table:table-cell>
          <table:table-cell office:value-type="string" office:string-value="Young" table:formula="of:=IF([.B38]&lt;=24;&quot;Young&quot;;IF([.B38]&lt;=34;&quot;Adult&quot;;&quot;Middle-Aged&quot;))" table:style-name="ce4">
            <text:p>Young</text:p>
          </table:table-cell>
          <table:table-cell office:value-type="string" office:string-value="18-24" table:formula="of:=IF([.B38]&lt;=24;&quot;18-24&quot;;IF([.B38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8</text:p>
          </table:table-cell>
          <table:table-cell office:value-type="float" office:value="34" table:style-name="ce4">
            <text:p>34</text:p>
          </table:table-cell>
          <table:table-cell office:value-type="string" office:string-value="Adult" table:formula="of:=IF([.B39]&lt;=24;&quot;Young&quot;;IF([.B39]&lt;=34;&quot;Adult&quot;;&quot;Middle-Aged&quot;))" table:style-name="ce4">
            <text:p>Adult</text:p>
          </table:table-cell>
          <table:table-cell office:value-type="string" office:string-value="25-34" table:formula="of:=IF([.B39]&lt;=24;&quot;18-24&quot;;IF([.B39]&lt;=34;&quot;25-34&quot;;&quot;35+&quot;))" table:style-name="ce4">
            <text:p>25-34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42" table:style-name="ce4">
            <text:p>142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39</text:p>
          </table:table-cell>
          <table:table-cell office:value-type="float" office:value="29" table:style-name="ce4">
            <text:p>29</text:p>
          </table:table-cell>
          <table:table-cell office:value-type="string" office:string-value="Adult" table:formula="of:=IF([.B40]&lt;=24;&quot;Young&quot;;IF([.B40]&lt;=34;&quot;Adult&quot;;&quot;Middle-Aged&quot;))" table:style-name="ce4">
            <text:p>Adult</text:p>
          </table:table-cell>
          <table:table-cell office:value-type="string" office:string-value="25-34" table:formula="of:=IF([.B40]&lt;=24;&quot;18-24&quot;;IF([.B40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0</text:p>
          </table:table-cell>
          <table:table-cell office:value-type="float" office:value="40" table:style-name="ce4">
            <text:p>40</text:p>
          </table:table-cell>
          <table:table-cell office:value-type="string" office:string-value="Middle-Aged" table:formula="of:=IF([.B41]&lt;=24;&quot;Young&quot;;IF([.B41]&lt;=34;&quot;Adult&quot;;&quot;Middle-Aged&quot;))" table:style-name="ce4">
            <text:p>Middle-Aged</text:p>
          </table:table-cell>
          <table:table-cell office:value-type="string" office:string-value="35+" table:formula="of:=IF([.B41]&lt;=24;&quot;18-24&quot;;IF([.B41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05" table:style-name="ce4">
            <text:p>105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1</text:p>
          </table:table-cell>
          <table:table-cell office:value-type="float" office:value="21" table:style-name="ce4">
            <text:p>21</text:p>
          </table:table-cell>
          <table:table-cell office:value-type="string" office:string-value="Young" table:formula="of:=IF([.B42]&lt;=24;&quot;Young&quot;;IF([.B42]&lt;=34;&quot;Adult&quot;;&quot;Middle-Aged&quot;))" table:style-name="ce4">
            <text:p>Young</text:p>
          </table:table-cell>
          <table:table-cell office:value-type="string" office:string-value="18-24" table:formula="of:=IF([.B42]&lt;=24;&quot;18-24&quot;;IF([.B42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2</text:p>
          </table:table-cell>
          <table:table-cell office:value-type="float" office:value="36" table:style-name="ce4">
            <text:p>36</text:p>
          </table:table-cell>
          <table:table-cell office:value-type="string" office:string-value="Middle-Aged" table:formula="of:=IF([.B43]&lt;=24;&quot;Young&quot;;IF([.B43]&lt;=34;&quot;Adult&quot;;&quot;Middle-Aged&quot;))" table:style-name="ce4">
            <text:p>Middle-Aged</text:p>
          </table:table-cell>
          <table:table-cell office:value-type="string" office:string-value="35+" table:formula="of:=IF([.B43]&lt;=24;&quot;18-24&quot;;IF([.B43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55" table:style-name="ce4">
            <text:p>15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3</text:p>
          </table:table-cell>
          <table:table-cell office:value-type="float" office:value="27" table:style-name="ce4">
            <text:p>27</text:p>
          </table:table-cell>
          <table:table-cell office:value-type="string" office:string-value="Adult" table:formula="of:=IF([.B44]&lt;=24;&quot;Young&quot;;IF([.B44]&lt;=34;&quot;Adult&quot;;&quot;Middle-Aged&quot;))" table:style-name="ce4">
            <text:p>Adult</text:p>
          </table:table-cell>
          <table:table-cell office:value-type="string" office:string-value="25-34" table:formula="of:=IF([.B44]&lt;=24;&quot;18-24&quot;;IF([.B44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4</text:p>
          </table:table-cell>
          <table:table-cell office:value-type="float" office:value="38" table:style-name="ce4">
            <text:p>38</text:p>
          </table:table-cell>
          <table:table-cell office:value-type="string" office:string-value="Middle-Aged" table:formula="of:=IF([.B45]&lt;=24;&quot;Young&quot;;IF([.B45]&lt;=34;&quot;Adult&quot;;&quot;Middle-Aged&quot;))" table:style-name="ce4">
            <text:p>Middle-Aged</text:p>
          </table:table-cell>
          <table:table-cell office:value-type="string" office:string-value="35+" table:formula="of:=IF([.B45]&lt;=24;&quot;18-24&quot;;IF([.B45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5</text:p>
          </table:table-cell>
          <table:table-cell office:value-type="float" office:value="25" table:style-name="ce4">
            <text:p>25</text:p>
          </table:table-cell>
          <table:table-cell office:value-type="string" office:string-value="Adult" table:formula="of:=IF([.B46]&lt;=24;&quot;Young&quot;;IF([.B46]&lt;=34;&quot;Adult&quot;;&quot;Middle-Aged&quot;))" table:style-name="ce4">
            <text:p>Adult</text:p>
          </table:table-cell>
          <table:table-cell office:value-type="string" office:string-value="25-34" table:formula="of:=IF([.B46]&lt;=24;&quot;18-24&quot;;IF([.B46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6</text:p>
          </table:table-cell>
          <table:table-cell office:value-type="float" office:value="43" table:style-name="ce4">
            <text:p>43</text:p>
          </table:table-cell>
          <table:table-cell office:value-type="string" office:string-value="Middle-Aged" table:formula="of:=IF([.B47]&lt;=24;&quot;Young&quot;;IF([.B47]&lt;=34;&quot;Adult&quot;;&quot;Middle-Aged&quot;))" table:style-name="ce4">
            <text:p>Middle-Aged</text:p>
          </table:table-cell>
          <table:table-cell office:value-type="string" office:string-value="35+" table:formula="of:=IF([.B47]&lt;=24;&quot;18-24&quot;;IF([.B47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75" table:style-name="ce4">
            <text:p>175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7</text:p>
          </table:table-cell>
          <table:table-cell office:value-type="float" office:value="30" table:style-name="ce4">
            <text:p>30</text:p>
          </table:table-cell>
          <table:table-cell office:value-type="string" office:string-value="Adult" table:formula="of:=IF([.B48]&lt;=24;&quot;Young&quot;;IF([.B48]&lt;=34;&quot;Adult&quot;;&quot;Middle-Aged&quot;))" table:style-name="ce4">
            <text:p>Adult</text:p>
          </table:table-cell>
          <table:table-cell office:value-type="string" office:string-value="25-34" table:formula="of:=IF([.B48]&lt;=24;&quot;18-24&quot;;IF([.B48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8</text:p>
          </table:table-cell>
          <table:table-cell office:value-type="float" office:value="35" table:style-name="ce4">
            <text:p>35</text:p>
          </table:table-cell>
          <table:table-cell office:value-type="string" office:string-value="Middle-Aged" table:formula="of:=IF([.B49]&lt;=24;&quot;Young&quot;;IF([.B49]&lt;=34;&quot;Adult&quot;;&quot;Middle-Aged&quot;))" table:style-name="ce4">
            <text:p>Middle-Aged</text:p>
          </table:table-cell>
          <table:table-cell office:value-type="string" office:string-value="35+" table:formula="of:=IF([.B49]&lt;=24;&quot;18-24&quot;;IF([.B49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49</text:p>
          </table:table-cell>
          <table:table-cell office:value-type="float" office:value="22" table:style-name="ce4">
            <text:p>22</text:p>
          </table:table-cell>
          <table:table-cell office:value-type="string" office:string-value="Young" table:formula="of:=IF([.B50]&lt;=24;&quot;Young&quot;;IF([.B50]&lt;=34;&quot;Adult&quot;;&quot;Middle-Aged&quot;))" table:style-name="ce4">
            <text:p>Young</text:p>
          </table:table-cell>
          <table:table-cell office:value-type="string" office:string-value="18-24" table:formula="of:=IF([.B50]&lt;=24;&quot;18-24&quot;;IF([.B50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0</text:p>
          </table:table-cell>
          <table:table-cell office:value-type="float" office:value="39" table:style-name="ce4">
            <text:p>39</text:p>
          </table:table-cell>
          <table:table-cell office:value-type="string" office:string-value="Middle-Aged" table:formula="of:=IF([.B51]&lt;=24;&quot;Young&quot;;IF([.B51]&lt;=34;&quot;Adult&quot;;&quot;Middle-Aged&quot;))" table:style-name="ce4">
            <text:p>Middle-Aged</text:p>
          </table:table-cell>
          <table:table-cell office:value-type="string" office:string-value="35+" table:formula="of:=IF([.B51]&lt;=24;&quot;18-24&quot;;IF([.B51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48" table:style-name="ce4">
            <text:p>148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1</text:p>
          </table:table-cell>
          <table:table-cell office:value-type="float" office:value="28" table:style-name="ce4">
            <text:p>28</text:p>
          </table:table-cell>
          <table:table-cell office:value-type="string" office:string-value="Adult" table:formula="of:=IF([.B52]&lt;=24;&quot;Young&quot;;IF([.B52]&lt;=34;&quot;Adult&quot;;&quot;Middle-Aged&quot;))" table:style-name="ce4">
            <text:p>Adult</text:p>
          </table:table-cell>
          <table:table-cell office:value-type="string" office:string-value="25-34" table:formula="of:=IF([.B52]&lt;=24;&quot;18-24&quot;;IF([.B52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2</text:p>
          </table:table-cell>
          <table:table-cell office:value-type="float" office:value="41" table:style-name="ce4">
            <text:p>41</text:p>
          </table:table-cell>
          <table:table-cell office:value-type="string" office:string-value="Middle-Aged" table:formula="of:=IF([.B53]&lt;=24;&quot;Young&quot;;IF([.B53]&lt;=34;&quot;Adult&quot;;&quot;Middle-Aged&quot;))" table:style-name="ce4">
            <text:p>Middle-Aged</text:p>
          </table:table-cell>
          <table:table-cell office:value-type="string" office:string-value="35+" table:formula="of:=IF([.B53]&lt;=24;&quot;18-24&quot;;IF([.B53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60" table:style-name="ce4">
            <text:p>16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3</text:p>
          </table:table-cell>
          <table:table-cell office:value-type="float" office:value="24" table:style-name="ce4">
            <text:p>24</text:p>
          </table:table-cell>
          <table:table-cell office:value-type="string" office:string-value="Young" table:formula="of:=IF([.B54]&lt;=24;&quot;Young&quot;;IF([.B54]&lt;=34;&quot;Adult&quot;;&quot;Middle-Aged&quot;))" table:style-name="ce4">
            <text:p>Young</text:p>
          </table:table-cell>
          <table:table-cell office:value-type="string" office:string-value="18-24" table:formula="of:=IF([.B54]&lt;=24;&quot;18-24&quot;;IF([.B54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4</text:p>
          </table:table-cell>
          <table:table-cell office:value-type="float" office:value="37" table:style-name="ce4">
            <text:p>37</text:p>
          </table:table-cell>
          <table:table-cell office:value-type="string" office:string-value="Middle-Aged" table:formula="of:=IF([.B55]&lt;=24;&quot;Young&quot;;IF([.B55]&lt;=34;&quot;Adult&quot;;&quot;Middle-Aged&quot;))" table:style-name="ce4">
            <text:p>Middle-Aged</text:p>
          </table:table-cell>
          <table:table-cell office:value-type="string" office:string-value="35+" table:formula="of:=IF([.B55]&lt;=24;&quot;18-24&quot;;IF([.B55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5</text:p>
          </table:table-cell>
          <table:table-cell office:value-type="float" office:value="26" table:style-name="ce4">
            <text:p>26</text:p>
          </table:table-cell>
          <table:table-cell office:value-type="string" office:string-value="Adult" table:formula="of:=IF([.B56]&lt;=24;&quot;Young&quot;;IF([.B56]&lt;=34;&quot;Adult&quot;;&quot;Middle-Aged&quot;))" table:style-name="ce4">
            <text:p>Adult</text:p>
          </table:table-cell>
          <table:table-cell office:value-type="string" office:string-value="25-34" table:formula="of:=IF([.B56]&lt;=24;&quot;18-24&quot;;IF([.B56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6</text:p>
          </table:table-cell>
          <table:table-cell office:value-type="float" office:value="42" table:style-name="ce4">
            <text:p>42</text:p>
          </table:table-cell>
          <table:table-cell office:value-type="string" office:string-value="Middle-Aged" table:formula="of:=IF([.B57]&lt;=24;&quot;Young&quot;;IF([.B57]&lt;=34;&quot;Adult&quot;;&quot;Middle-Aged&quot;))" table:style-name="ce4">
            <text:p>Middle-Aged</text:p>
          </table:table-cell>
          <table:table-cell office:value-type="string" office:string-value="35+" table:formula="of:=IF([.B57]&lt;=24;&quot;18-24&quot;;IF([.B57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55" table:style-name="ce4">
            <text:p>155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7</text:p>
          </table:table-cell>
          <table:table-cell office:value-type="float" office:value="29" table:style-name="ce4">
            <text:p>29</text:p>
          </table:table-cell>
          <table:table-cell office:value-type="string" office:string-value="Adult" table:formula="of:=IF([.B58]&lt;=24;&quot;Young&quot;;IF([.B58]&lt;=34;&quot;Adult&quot;;&quot;Middle-Aged&quot;))" table:style-name="ce4">
            <text:p>Adult</text:p>
          </table:table-cell>
          <table:table-cell office:value-type="string" office:string-value="25-34" table:formula="of:=IF([.B58]&lt;=24;&quot;18-24&quot;;IF([.B58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8</text:p>
          </table:table-cell>
          <table:table-cell office:value-type="float" office:value="38" table:style-name="ce4">
            <text:p>38</text:p>
          </table:table-cell>
          <table:table-cell office:value-type="string" office:string-value="Middle-Aged" table:formula="of:=IF([.B59]&lt;=24;&quot;Young&quot;;IF([.B59]&lt;=34;&quot;Adult&quot;;&quot;Middle-Aged&quot;))" table:style-name="ce4">
            <text:p>Middle-Aged</text:p>
          </table:table-cell>
          <table:table-cell office:value-type="string" office:string-value="35+" table:formula="of:=IF([.B59]&lt;=24;&quot;18-24&quot;;IF([.B59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10" table:style-name="ce4">
            <text:p>11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59</text:p>
          </table:table-cell>
          <table:table-cell office:value-type="float" office:value="23" table:style-name="ce4">
            <text:p>23</text:p>
          </table:table-cell>
          <table:table-cell office:value-type="string" office:string-value="Young" table:formula="of:=IF([.B60]&lt;=24;&quot;Young&quot;;IF([.B60]&lt;=34;&quot;Adult&quot;;&quot;Middle-Aged&quot;))" table:style-name="ce4">
            <text:p>Young</text:p>
          </table:table-cell>
          <table:table-cell office:value-type="string" office:string-value="18-24" table:formula="of:=IF([.B60]&lt;=24;&quot;18-24&quot;;IF([.B60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0</text:p>
          </table:table-cell>
          <table:table-cell office:value-type="float" office:value="40" table:style-name="ce4">
            <text:p>40</text:p>
          </table:table-cell>
          <table:table-cell office:value-type="string" office:string-value="Middle-Aged" table:formula="of:=IF([.B61]&lt;=24;&quot;Young&quot;;IF([.B61]&lt;=34;&quot;Adult&quot;;&quot;Middle-Aged&quot;))" table:style-name="ce4">
            <text:p>Middle-Aged</text:p>
          </table:table-cell>
          <table:table-cell office:value-type="string" office:string-value="35+" table:formula="of:=IF([.B61]&lt;=24;&quot;18-24&quot;;IF([.B61]&lt;=34;&quot;25-34&quot;;&quot;35+&quot;))" table:style-name="ce4">
            <text:p>35+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65" table:style-name="ce4">
            <text:p>16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1</text:p>
          </table:table-cell>
          <table:table-cell office:value-type="float" office:value="27" table:style-name="ce4">
            <text:p>27</text:p>
          </table:table-cell>
          <table:table-cell office:value-type="string" office:string-value="Adult" table:formula="of:=IF([.B62]&lt;=24;&quot;Young&quot;;IF([.B62]&lt;=34;&quot;Adult&quot;;&quot;Middle-Aged&quot;))" table:style-name="ce4">
            <text:p>Adult</text:p>
          </table:table-cell>
          <table:table-cell office:value-type="string" office:string-value="25-34" table:formula="of:=IF([.B62]&lt;=24;&quot;18-24&quot;;IF([.B62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hiphop</text:p>
          </table:table-cell>
          <table:table-cell office:value-type="string" table:style-name="ce4">
            <text:p>0.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2</text:p>
          </table:table-cell>
          <table:table-cell office:value-type="float" office:value="36" table:style-name="ce4">
            <text:p>36</text:p>
          </table:table-cell>
          <table:table-cell office:value-type="string" office:string-value="Middle-Aged" table:formula="of:=IF([.B63]&lt;=24;&quot;Young&quot;;IF([.B63]&lt;=34;&quot;Adult&quot;;&quot;Middle-Aged&quot;))" table:style-name="ce4">
            <text:p>Middle-Aged</text:p>
          </table:table-cell>
          <table:table-cell office:value-type="string" office:string-value="35+" table:formula="of:=IF([.B63]&lt;=24;&quot;18-24&quot;;IF([.B63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3</text:p>
          </table:table-cell>
          <table:table-cell office:value-type="float" office:value="25" table:style-name="ce4">
            <text:p>25</text:p>
          </table:table-cell>
          <table:table-cell office:value-type="string" office:string-value="Adult" table:formula="of:=IF([.B64]&lt;=24;&quot;Young&quot;;IF([.B64]&lt;=34;&quot;Adult&quot;;&quot;Middle-Aged&quot;))" table:style-name="ce4">
            <text:p>Adult</text:p>
          </table:table-cell>
          <table:table-cell office:value-type="string" office:string-value="25-34" table:formula="of:=IF([.B64]&lt;=24;&quot;18-24&quot;;IF([.B64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desktop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4</text:p>
          </table:table-cell>
          <table:table-cell office:value-type="float" office:value="44" table:style-name="ce4">
            <text:p>44</text:p>
          </table:table-cell>
          <table:table-cell office:value-type="string" office:string-value="Middle-Aged" table:formula="of:=IF([.B65]&lt;=24;&quot;Young&quot;;IF([.B65]&lt;=34;&quot;Adult&quot;;&quot;Middle-Aged&quot;))" table:style-name="ce4">
            <text:p>Middle-Aged</text:p>
          </table:table-cell>
          <table:table-cell office:value-type="string" office:string-value="35+" table:formula="of:=IF([.B65]&lt;=24;&quot;18-24&quot;;IF([.B65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5</text:p>
          </table:table-cell>
          <table:table-cell office:value-type="float" office:value="22" table:style-name="ce4">
            <text:p>22</text:p>
          </table:table-cell>
          <table:table-cell office:value-type="string" office:string-value="Young" table:formula="of:=IF([.B66]&lt;=24;&quot;Young&quot;;IF([.B66]&lt;=34;&quot;Adult&quot;;&quot;Middle-Aged&quot;))" table:style-name="ce4">
            <text:p>Young</text:p>
          </table:table-cell>
          <table:table-cell office:value-type="string" office:string-value="18-24" table:formula="of:=IF([.B66]&lt;=24;&quot;18-24&quot;;IF([.B66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6</text:p>
          </table:table-cell>
          <table:table-cell office:value-type="float" office:value="31" table:style-name="ce4">
            <text:p>31</text:p>
          </table:table-cell>
          <table:table-cell office:value-type="string" office:string-value="Adult" table:formula="of:=IF([.B67]&lt;=24;&quot;Young&quot;;IF([.B67]&lt;=34;&quot;Adult&quot;;&quot;Middle-Aged&quot;))" table:style-name="ce4">
            <text:p>Adult</text:p>
          </table:table-cell>
          <table:table-cell office:value-type="string" office:string-value="25-34" table:formula="of:=IF([.B67]&lt;=24;&quot;18-24&quot;;IF([.B67]&lt;=34;&quot;25-34&quot;;&quot;35+&quot;))" table:style-name="ce4">
            <text:p>25-34</text:p>
          </table:table-cell>
          <table:table-cell office:value-type="string" table:style-name="ce4">
            <text:p>UK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0.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7</text:p>
          </table:table-cell>
          <table:table-cell office:value-type="float" office:value="28" table:style-name="ce4">
            <text:p>28</text:p>
          </table:table-cell>
          <table:table-cell office:value-type="string" office:string-value="Adult" table:formula="of:=IF([.B68]&lt;=24;&quot;Young&quot;;IF([.B68]&lt;=34;&quot;Adult&quot;;&quot;Middle-Aged&quot;))" table:style-name="ce4">
            <text:p>Adult</text:p>
          </table:table-cell>
          <table:table-cell office:value-type="string" office:string-value="25-34" table:formula="of:=IF([.B68]&lt;=24;&quot;18-24&quot;;IF([.B68]&lt;=34;&quot;25-34&quot;;&quot;35+&quot;))" table:style-name="ce4">
            <text:p>25-3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iphop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8</text:p>
          </table:table-cell>
          <table:table-cell office:value-type="float" office:value="39" table:style-name="ce4">
            <text:p>39</text:p>
          </table:table-cell>
          <table:table-cell office:value-type="string" office:string-value="Middle-Aged" table:formula="of:=IF([.B69]&lt;=24;&quot;Young&quot;;IF([.B69]&lt;=34;&quot;Adult&quot;;&quot;Middle-Aged&quot;))" table:style-name="ce4">
            <text:p>Middle-Aged</text:p>
          </table:table-cell>
          <table:table-cell office:value-type="string" office:string-value="35+" table:formula="of:=IF([.B69]&lt;=24;&quot;18-24&quot;;IF([.B69]&lt;=34;&quot;25-34&quot;;&quot;35+&quot;))" table:style-name="ce4">
            <text:p>35+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desktop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jazz</text:p>
          </table:table-cell>
          <table:table-cell office:value-type="string" table:style-name="ce4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69</text:p>
          </table:table-cell>
          <table:table-cell office:value-type="float" office:value="24" table:style-name="ce4">
            <text:p>24</text:p>
          </table:table-cell>
          <table:table-cell office:value-type="string" office:string-value="Young" table:formula="of:=IF([.B70]&lt;=24;&quot;Young&quot;;IF([.B70]&lt;=34;&quot;Adult&quot;;&quot;Middle-Aged&quot;))" table:style-name="ce4">
            <text:p>Young</text:p>
          </table:table-cell>
          <table:table-cell office:value-type="string" office:string-value="18-24" table:formula="of:=IF([.B70]&lt;=24;&quot;18-24&quot;;IF([.B70]&lt;=34;&quot;25-34&quot;;&quot;35+&quot;))" table:style-name="ce4">
            <text:p>18-24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obile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0.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070</text:p>
          </table:table-cell>
          <table:table-cell office:value-type="float" office:value="41" table:style-name="ce4">
            <text:p>41</text:p>
          </table:table-cell>
          <table:table-cell office:value-type="string" office:string-value="Middle-Aged" table:formula="of:=IF([.B71]&lt;=24;&quot;Young&quot;;IF([.B71]&lt;=34;&quot;Adult&quot;;&quot;Middle-Aged&quot;))" table:style-name="ce4">
            <text:p>Middle-Aged</text:p>
          </table:table-cell>
          <table:table-cell office:value-type="string" office:string-value="35+" table:formula="of:=IF([.B71]&lt;=24;&quot;18-24&quot;;IF([.B71]&lt;=34;&quot;25-34&quot;;&quot;35+&quot;))" table:style-name="ce4">
            <text:p>35+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premium</text:p>
          </table:table-cell>
          <table:table-cell office:value-type="string" table:style-name="ce4">
            <text:p>mobile</text:p>
          </table:table-cell>
          <table:table-cell office:value-type="float" office:value="105" table:style-name="ce4">
            <text:p>105</text:p>
          </table:table-cell>
          <table:table-cell office:value-type="string" table:style-name="ce4">
            <text:p>classical</text:p>
          </table:table-cell>
          <table:table-cell office:value-type="string" table:style-name="ce4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number-rows-repeated="1048505" table:style-name="ro2">
          <table:table-cell table:number-columns-repeated="16384"/>
        </table:table-row>
      </table:table>
      <table:table table:name="DataDictionary" table:style-name="ta1">
        <table:table-column table:style-name="co12" table:default-cell-style-name="ce1"/>
        <table:table-column table:style-name="co13" table:default-cell-style-name="ce4"/>
        <table:table-column table:style-name="co1" table:number-columns-repeated="16382" table:default-cell-style-name="ce1"/>
        <table:table-row table:style-name="ro2">
          <table:table-cell office:value-type="string" table:style-name="ce10">
            <text:p>COLUMN</text:p>
          </table:table-cell>
          <table:table-cell office:value-type="string" table:style-name="ce10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user_id</text:p>
          </table:table-cell>
          <table:table-cell office:value-type="string" table:style-name="ce4">
            <text:p>Usernam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e</text:p>
          </table:table-cell>
          <table:table-cell office:value-type="string" table:style-name="ce4">
            <text:p>Ag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untry</text:p>
          </table:table-cell>
          <table:table-cell office:value-type="string" table:style-name="ce4">
            <text:p>Country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bscription_type</text:p>
          </table:table-cell>
          <table:table-cell office:value-type="string" table:style-name="ce4">
            <text:p>Free / Premium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vice</text:p>
          </table:table-cell>
          <table:table-cell office:value-type="string" table:style-name="ce4">
            <text:p>Mobile / Desktop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ily_minutes</text:p>
          </table:table-cell>
          <table:table-cell office:value-type="string" table:style-name="ce11">
            <text:p>Daily listening tim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vorite_genre</text:p>
          </table:table-cell>
          <table:table-cell office:value-type="string" table:style-name="ce4">
            <text:p>Music genr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kip_rate</text:p>
          </table:table-cell>
          <table:table-cell office:value-type="string" table:style-name="ce4">
            <text:p>Skip rat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s_clicked</text:p>
          </table:table-cell>
          <table:table-cell office:value-type="string" table:style-name="ce4">
            <text:p>Ad click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urned</text:p>
          </table:table-cell>
          <table:table-cell office:value-type="string" table:style-name="ce11">
            <text:p>Changed platform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e_categorize</text:p>
          </table:table-cell>
          <table:table-cell office:value-type="string" table:style-name="ce4">
            <text:p>Age categorizati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(Churned = 1) <text:s/>User has left / canceled their subscription<text:s/>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1">
            <text:p>(Churned = 0) <text:s/>The user is still active / has not left<text:s/></text:p>
          </table:table-cell>
          <table:table-cell table:style-name="ce4"/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  <table:table table:name="Analyse" table:style-name="ta1"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number-columns-repeated="64" table:default-cell-style-name="ce1"/>
        <table:table-column table:style-name="co18" table:default-cell-style-name="ce1"/>
        <table:table-column table:style-name="co1" table:number-columns-repeated="16312" table:default-cell-style-name="ce1"/>
        <table:table-row table:style-name="ro2">
          <table:table-cell table:number-columns-repeated="4"/>
          <table:table-cell table:style-name="ce1">
            <draw:frame draw:z-index="1" draw:id="id0" draw:style-name="a0" draw:name="Çizelge 1" svg:x="0.03125in" svg:y="0.04167in" svg:width="3.47917in" svg:height="1.86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number-columns-spanned="3" table:number-rows-spanned="1" table:style-name="ce31">
            <text:p>Number of Members / Percentage by Country</text:p>
          </table:table-cell>
          <table:covered-table-cell table:number-columns-repeated="2"/>
          <table:table-cell table:number-columns-repeated="7"/>
          <table:table-cell table:style-name="ce1">
            <draw:frame draw:z-index="5" draw:id="id4" draw:style-name="a12" draw:name="Metin Kutusu 10" svg:x="0.03125in" svg:y="0.14583in" svg:width="5.01042in" svg:height="1.21875in">
              <draw:text-box>
                <text:p text:style-name="a5" text:class-names="" text:cond-style-name=""><text:span text:style-name="a4" text:class-names=""/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- 49% of users are from Turkey.</text:span></text:p>
                <text:p text:style-name="a11" text:class-names="" text:cond-style-name=""><text:span text:style-name="a10" text:class-names="">- Germany, the United Kingdom, and France have similar user percentages.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12">
            <text:p>country</text:p>
          </table:table-cell>
          <table:table-cell office:value-type="string" table:style-name="ce13">
            <text:p>Say user_id</text:p>
          </table:table-cell>
          <table:table-cell office:value-type="string" table:style-name="ce13">
            <text:p>Say user_id2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TR</text:p>
          </table:table-cell>
          <table:table-cell office:value-type="float" office:value="34" table:style-name="ce14">
            <text:p>34</text:p>
          </table:table-cell>
          <table:table-cell office:value-type="percentage" office:value="0.48571428571428571" table:style-name="ce15">
            <text:p>49%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DE</text:p>
          </table:table-cell>
          <table:table-cell office:value-type="float" office:value="13" table:style-name="ce14">
            <text:p>13</text:p>
          </table:table-cell>
          <table:table-cell office:value-type="percentage" office:value="0.18571428571428572" table:style-name="ce15">
            <text:p>19%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UK</text:p>
          </table:table-cell>
          <table:table-cell office:value-type="float" office:value="12" table:style-name="ce14">
            <text:p>12</text:p>
          </table:table-cell>
          <table:table-cell office:value-type="percentage" office:value="0.17142857142857143" table:style-name="ce15">
            <text:p>17%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FR</text:p>
          </table:table-cell>
          <table:table-cell office:value-type="float" office:value="11" table:style-name="ce14">
            <text:p>11</text:p>
          </table:table-cell>
          <table:table-cell office:value-type="percentage" office:value="0.15714285714285714" table:style-name="ce15">
            <text:p>16%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Total</text:p>
          </table:table-cell>
          <table:table-cell office:value-type="float" office:value="70" table:style-name="ce14">
            <text:p>70</text:p>
          </table:table-cell>
          <table:table-cell office:value-type="percentage" office:value="1" table:style-name="ce15">
            <text:p>100%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">
            <draw:frame draw:z-index="2" draw:id="id1" draw:style-name="a1" draw:name="Çizelge 4" svg:x="0.02083in" svg:y="0.0625in" svg:width="3.52083in" svg:height="1.531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8" draw:id="id7" draw:style-name="a41" draw:name="Metin Kutusu 2" svg:x="0.125in" svg:y="0.09375in" svg:width="5.01042in" svg:height="1.21875in">
              <draw:text-box>
                <text:p text:style-name="a36" text:class-names="" text:cond-style-name=""><text:span text:style-name="a35" text:class-names=""/></text:p>
                <text:p text:style-name="a38" text:class-names="" text:cond-style-name=""><text:span text:style-name="a37" text:class-names=""/></text:p>
                <text:p text:style-name="a40" text:class-names="" text:cond-style-name=""><text:span text:style-name="a39" text:class-names="">50% of users have a free subscription, and 50% have a premium subscription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31">
            <text:p>Number/Ratio of Members by Subscription Typ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subscription_type</text:p>
          </table:table-cell>
          <table:table-cell office:value-type="string" table:style-name="ce13">
            <text:p>Say user_id</text:p>
          </table:table-cell>
          <table:table-cell office:value-type="string" table:style-name="ce13">
            <text:p>Say user_id2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free</text:p>
          </table:table-cell>
          <table:table-cell office:value-type="float" office:value="35" table:style-name="ce14">
            <text:p>35</text:p>
          </table:table-cell>
          <table:table-cell office:value-type="percentage" office:value="0.5" table:style-name="ce15">
            <text:p>50%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premium</text:p>
          </table:table-cell>
          <table:table-cell office:value-type="float" office:value="35" table:style-name="ce14">
            <text:p>35</text:p>
          </table:table-cell>
          <table:table-cell office:value-type="percentage" office:value="0.5" table:style-name="ce15">
            <text:p>50%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Total</text:p>
          </table:table-cell>
          <table:table-cell office:value-type="float" office:value="70" table:style-name="ce14">
            <text:p>70</text:p>
          </table:table-cell>
          <table:table-cell office:value-type="percentage" office:value="1" table:style-name="ce15">
            <text:p>100%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">
            <draw:frame draw:z-index="3" draw:id="id2" draw:style-name="a2" draw:name="Çizelge 5" svg:x="0in" svg:y="0.19792in" svg:width="3.59375in" svg:height="2.114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6" draw:id="id5" draw:style-name="a25" draw:name="Metin Kutusu 12" svg:x="0.17708in" svg:y="0.01042in" svg:width="4.84375in" svg:height="1.95833in">
              <draw:text-box>
                <text:p text:style-name="a14" text:class-names="" text:cond-style-name=""><text:span text:style-name="a13" text:class-names=""/></text:p>
                <text:p text:style-name="a16" text:class-names="" text:cond-style-name=""><text:span text:style-name="a15" text:class-names=""/></text:p>
                <text:p text:style-name="a18" text:class-names="" text:cond-style-name=""><text:span text:style-name="a17" text:class-names="">-The highest average daily listening time is found in the jazz and classical genres.<text:s text:c="1"/></text:span></text:p>
                <text:p text:style-name="a20" text:class-names="" text:cond-style-name=""><text:span text:style-name="a19" text:class-names="">-The rock genre also has a high average.<text:s text:c="1"/></text:span></text:p>
                <text:p text:style-name="a22" text:class-names="" text:cond-style-name=""><text:span text:style-name="a21" text:class-names="">-In contrast, listening time is lower for hip-hop and pop genres.<text:s text:c="1"/></text:span></text:p>
                <text:p text:style-name="a24" text:class-names="" text:cond-style-name=""><text:span text:style-name="a23" text:class-names="">-In general, we can say that users listen to genres like classical and jazz more frequently.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25">
            <text:p>Average Daily Listening Time by Favorite Music Genr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12">
            <text:p>favorite_genre</text:p>
          </table:table-cell>
          <table:table-cell office:value-type="string" table:style-name="ce13">
            <text:p>Ortalama daily_minut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jazz</text:p>
          </table:table-cell>
          <table:table-cell office:value-type="float" office:value="145.41666666666666" table:style-name="ce16">
            <text:p>14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classical</text:p>
          </table:table-cell>
          <table:table-cell office:value-type="float" office:value="140.5" table:style-name="ce16">
            <text:p>14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rock</text:p>
          </table:table-cell>
          <table:table-cell office:value-type="float" office:value="117.30769230769231" table:style-name="ce16">
            <text:p>1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pop</text:p>
          </table:table-cell>
          <table:table-cell office:value-type="float" office:value="56.904761904761905" table:style-name="ce16">
            <text:p>5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hiphop</text:p>
          </table:table-cell>
          <table:table-cell office:value-type="float" office:value="33.142857142857146" table:style-name="ce16">
            <text:p>3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Total</text:p>
          </table:table-cell>
          <table:table-cell office:value-type="float" office:value="90.48571428571428" table:style-name="ce16">
            <text:p>90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draw:z-index="4" draw:id="id3" draw:style-name="a3" draw:name="Çizelge 7" svg:x="0.875in" svg:y="0.15625in" svg:width="3.64583in" svg:height="1.68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25">
            <text:p>Average Daily Listening Time by Subscription Type</text:p>
          </table:table-cell>
          <table:covered-table-cell/>
          <table:table-cell table:number-columns-repeated="8"/>
          <table:table-cell table:style-name="ce1">
            <draw:frame draw:z-index="7" draw:id="id6" draw:style-name="a34" draw:name="Metin Kutusu 13" svg:x="0.25in" svg:y="0in" svg:width="4.92708in" svg:height="1.64583in">
              <draw:text-box>
                <text:p text:style-name="a27" text:class-names="" text:cond-style-name=""><text:span text:style-name="a26" text:class-names=""/></text:p>
                <text:p text:style-name="a29" text:class-names="" text:cond-style-name=""><text:span text:style-name="a28" text:class-names="">- Premium users use the platform much more intensively, averaging 136 minutes per day.</text:span></text:p>
                <text:p text:style-name="a31" text:class-names="" text:cond-style-name=""><text:span text:style-name="a30" text:class-names="">- The average for free users is 45 minutes.</text:span></text:p>
                <text:p text:style-name="a33" text:class-names="" text:cond-style-name=""><text:span text:style-name="a32" text:class-names="">- In this case, we can say that premium subscribers are more engaged and active on the platform, while free users have more limited usage.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12">
            <text:p>subscription_type</text:p>
          </table:table-cell>
          <table:table-cell office:value-type="string" table:style-name="ce13">
            <text:p>Ortalama daily_minutes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premium</text:p>
          </table:table-cell>
          <table:table-cell office:value-type="float" office:value="135.71428571428572" table:style-name="ce16">
            <text:p>136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free</text:p>
          </table:table-cell>
          <table:table-cell office:value-type="float" office:value="45.25714285714286" table:style-name="ce16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</text:p>
          </table:table-cell>
          <table:table-cell office:value-type="float" office:value="90.48571428571428" table:style-name="ce16">
            <text:p>90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2">
            <text:p>subscription_type</text:p>
          </table:table-cell>
          <table:table-cell office:value-type="string" table:style-name="ce13">
            <text:p>(Tümü)</text:p>
          </table:table-cell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28">
            <text:p>Average Listening Time by Favorite Music Genre-2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">
            <text:p>favorite_genre</text:p>
          </table:table-cell>
          <table:table-cell office:value-type="string" table:style-name="ce13">
            <text:p>Ortalama daily_minutes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classical</text:p>
          </table:table-cell>
          <table:table-cell office:value-type="float" office:value="140.5" table:style-name="ce16">
            <text:p>141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hiphop</text:p>
          </table:table-cell>
          <table:table-cell office:value-type="float" office:value="33.142857142857146" table:style-name="ce16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jazz</text:p>
          </table:table-cell>
          <table:table-cell office:value-type="float" office:value="145.41666666666666" table:style-name="ce16">
            <text:p>145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pop</text:p>
          </table:table-cell>
          <table:table-cell office:value-type="float" office:value="56.904761904761905" table:style-name="ce16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rock</text:p>
          </table:table-cell>
          <table:table-cell office:value-type="float" office:value="117.30769230769231" table:style-name="ce16">
            <text:p>1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Total</text:p>
          </table:table-cell>
          <table:table-cell office:value-type="float" office:value="90.48571428571428" table:style-name="ce16">
            <text:p>90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draw:z-index="10" draw:id="id9" draw:style-name="a49" draw:name="Çizelge 8" svg:x="0.83333in" svg:y="0.04167in" svg:width="3.53125in" svg:height="2.104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number-columns-spanned="3" table:number-rows-spanned="1" table:style-name="ce30">
            <text:p>Churn Rate by Age Group</text:p>
          </table:table-cell>
          <table:covered-table-cell table:number-columns-repeated="2"/>
          <table:table-cell table:number-columns-repeated="7"/>
          <table:table-cell table:style-name="ce1">
            <draw:frame draw:z-index="9" draw:id="id8" draw:style-name="a48" draw:name="Metin Kutusu 6" svg:x="0.20833in" svg:y="0.10417in" svg:width="3.86458in" svg:height="1.21875in">
              <draw:text-box>
                <text:p text:style-name="a43" text:class-names="" text:cond-style-name=""><text:span text:style-name="a42" text:class-names="">The 25–34 age group has the highest churn rate. The rate at which users over 35 leave the platform is quite low.</text:span></text:p>
                <text:p text:style-name="a45" text:class-names="" text:cond-style-name=""><text:span text:style-name="a44" text:class-names=""/></text:p>
                <text:p text:style-name="a47" text:class-names="" text:cond-style-name=""><text:span text:style-name="a46" text:class-names="">This suggests that there may be an inverse relationship between age and user retention.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21">
            <text:p>age_category2</text:p>
          </table:table-cell>
          <table:table-cell office:value-type="string" table:style-name="ce22">
            <text:p>Say user_id</text:p>
          </table:table-cell>
          <table:table-cell office:value-type="string" table:style-name="ce22">
            <text:p>Total churned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18-24</text:p>
          </table:table-cell>
          <table:table-cell office:value-type="float" office:value="15" table:style-name="ce23">
            <text:p>15</text:p>
          </table:table-cell>
          <table:table-cell office:value-type="percentage" office:value="0.41935483870967744" table:style-name="ce24">
            <text:p>42%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25-34</text:p>
          </table:table-cell>
          <table:table-cell office:value-type="float" office:value="29" table:style-name="ce23">
            <text:p>29</text:p>
          </table:table-cell>
          <table:table-cell office:value-type="percentage" office:value="0.54838709677419351" table:style-name="ce24">
            <text:p>55%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35+</text:p>
          </table:table-cell>
          <table:table-cell office:value-type="float" office:value="26" table:style-name="ce23">
            <text:p>26</text:p>
          </table:table-cell>
          <table:table-cell office:value-type="percentage" office:value="3.2258064516129031E-2" table:style-name="ce24">
            <text:p>3%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Total</text:p>
          </table:table-cell>
          <table:table-cell office:value-type="float" office:value="70" table:style-name="ce23">
            <text:p>70</text:p>
          </table:table-cell>
          <table:table-cell office:value-type="percentage" office:value="1" table:style-name="ce24">
            <text:p>100%</text:p>
          </table:table-cell>
          <table:table-cell table:number-columns-repeated="16381"/>
        </table:table-row>
        <table:table-row table:number-rows-repeated="1048516" table:style-name="ro2">
          <table:table-cell table:number-columns-repeated="16384"/>
        </table:table-row>
      </table:table>
      <table:table table:name="Assumption" table:style-name="ta1">
        <table:table-column table:style-name="co20" table:default-cell-style-name="ce1"/>
        <table:table-column table:style-name="co1" table:number-columns-repeated="16383" table:default-cell-style-name="ce1"/>
        <table:table-row table:style-name="ro2">
          <table:table-cell table:number-columns-repeated="16384"/>
        </table:table-row>
        <table:table-row table:style-name="ro3">
          <table:table-cell office:value-type="string" table:style-name="ce19">
            <text:p>Hypothesis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H₀ (Null Hypothesis):</text:p>
          </table:table-cell>
          <table:table-cell table:number-columns-repeated="16383"/>
        </table:table-row>
        <table:table-row table:style-name="ro4">
          <table:table-cell office:value-type="string" table:style-name="ce17">
            <text:p>The subscription type (free vs. premium) does not affect users' churn behavior (leaving the platform).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H₁ (Alternatif Hypothesis):</text:p>
          </table:table-cell>
          <table:table-cell table:number-columns-repeated="16383"/>
        </table:table-row>
        <table:table-row table:style-name="ro4">
          <table:table-cell office:value-type="string" table:style-name="ce17">
            <text:p>The churn rate for premium users is significantly lower than that of free users.</text:p>
          </table:table-cell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0">
            <text:p>H₁ (Alternatif Hypothesis):</text:p>
          </table:table-cell>
          <table:table-cell table:number-columns-repeated="16383"/>
        </table:table-row>
        <table:table-row table:style-name="ro5">
          <table:table-cell office:value-type="string" table:style-name="ce17">
            <text:p>As daily listening time increases, the likelihood of churn decreases.</text:p>
          </table:table-cell>
          <table:table-cell table:number-columns-repeated="16383"/>
        </table:table-row>
        <table:table-row table:number-rows-repeated="1048565" table:style-name="ro2">
          <table:table-cell table:number-columns-repeated="16384"/>
        </table:table-row>
      </table:table>
      <table:database-ranges>
        <table:database-range table:target-range-address="DataDictionary.A1:DataDictionary.B12" table:name="Tablo2" table:display-filter-buttons="true"/>
        <table:database-range table:target-range-address="cleandata.A1:cleandata.L1" table:display-filter-buttons="true"/>
      </table:database-ranges>
      <table:data-pilot-tables>
        <table:data-pilot-table table:name="Favori Müzik Türüne Göre Günlük Ortalama Dinleme Süresi" table:target-range-address="Analyse.A23:Analyse.B29" table:show-filter-button="false" table:buttons="Analyse.A23">
          <table:source-cell-range table:cell-range-address="cleandata.A1:cleandata.L71"/>
          <table:data-pilot-field table:source-field-name="favorite_genr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daily_minutes" table:order="descending"/>
              <table:data-pilot-layout-info table:layout-mode="tabular-layout" table:add-empty-lines="false"/>
            </table:data-pilot-level>
          </table:data-pilot-field>
          <table:data-pilot-field table:source-field-name="daily_minute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ip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s_click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h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Analyse.A56:Analyse.C60" table:show-filter-button="false" table:buttons="Analyse.A56">
          <table:source-cell-range table:cell-range-address="cleandata.A1:cleandata.L1048576"/>
          <table:data-pilot-field table:source-field-name="Değerler" table:orientation="column" table:is-data-layout-field="true">
            <table:data-pilot-level table:show-empty="true"/>
          </table:data-pilot-field>
          <table:data-pilot-field table:source-field-name="age_category2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hurne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user_id" table:member-type="previous" table:type="column-percentage"/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ily_minu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vorite_gen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ip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s_click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Aboneliğe Göre Üye Sayısı" table:target-range-address="Analyse.A15:Analyse.C18" table:show-filter-button="false" table:buttons="Analyse.A15">
          <table:source-cell-range table:cell-range-address="cleandata.A1:cleandata.L71"/>
          <table:data-pilot-field table:source-field-name="Değerler" table:orientation="column" table:is-data-layout-field="true">
            <table:data-pilot-level table:show-empty="true"/>
          </table:data-pilot-field>
          <table:data-pilot-field table:source-field-name="subscription_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user_id" table:member-type="previous" table:type="column-percentage"/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ily_minu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vorite_gen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ip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s_click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h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Favori Müzik Türüne Göre Ortalama Dinleme Süresi-2" table:target-range-address="Analyse.A42:Analyse.B50" table:show-filter-button="false" table:buttons="Analyse.A42 Analyse.A44">
          <table:source-cell-range table:cell-range-address="cleandata.A1:cleandata.L71"/>
          <table:data-pilot-field table:source-field-name="subscription_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vorite_genr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ily_minute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ip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s_click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h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Abonelik Türüne Göre Günlük Ortalama Dinleme Süresi" table:target-range-address="Analyse.A34:Analyse.B37" table:show-filter-button="false" table:buttons="Analyse.A34">
          <table:source-cell-range table:cell-range-address="cleandata.A1:cleandata.L71"/>
          <table:data-pilot-field table:source-field-name="subscription_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daily_minutes" table:order="descending"/>
              <table:data-pilot-layout-info table:layout-mode="tabular-layout" table:add-empty-lines="false"/>
            </table:data-pilot-level>
          </table:data-pilot-field>
          <table:data-pilot-field table:source-field-name="daily_minute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vorite_gen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ip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s_click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h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Ülke Bazında Üyelik Oranları" table:target-range-address="Analyse.A3:Analyse.C8" table:show-filter-button="false" table:buttons="Analyse.A3">
          <table:source-cell-range table:cell-range-address="cleandata.A1:cleandata.L71"/>
          <table:data-pilot-field table:source-field-name="Değerler" table:orientation="column" table:is-data-layout-field="true">
            <table:data-pilot-level table:show-empty="true"/>
          </table:data-pilot-field>
          <table:data-pilot-field table:source-field-name="country" table:orientation="row">
            <table:data-pilot-level table:show-empty="false">
              <table:data-pilot-subtotals>
                <table:data-pilot-subtotal table:function="auto"/>
              </table:data-pilot-subtotals>
              <table:data-pilot-layout-info table:layout-mode="tabular-layout" table:add-empty-lines="false"/>
            </table:data-pilot-level>
          </table:data-pilot-field>
          <table:data-pilot-field table:source-field-name="user_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er_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user_id" table:member-type="previous" table:type="column-percentage"/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_categor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ily_minu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vorite_gen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ip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s_click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h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5-17T09:33:18Z</meta:creation-date>
    <dc:date>2026-06-06T13:26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34.25pt" svg:width="250.5pt" chart:style-name="Crt0">
        <chart:title svg:x="51.18244094488188pt" svg:y="6.6pt" chart:style-name="CT00">
          <text:p text:style-name="a0" text:class-names="" text:cond-style-name="">Number of Members / Percentage by Country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/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ay user_id</text:p>
              </table:table-cell>
              <table:table-cell office:value-type="string">
                <text:p>Say user_id2</text:p>
              </table:table-cell>
            </table:table-row>
          </table:table-header-rows>
          <table:table-row>
            <table:table-cell office:value-type="string">
              <text:p>TR</text:p>
            </table:table-cell>
            <table:table-cell office:value-type="float" office:value="34"/>
            <table:table-cell office:value-type="float" office:value="0.48571428571428571"/>
          </table:table-row>
          <table:table-row>
            <table:table-cell office:value-type="string">
              <text:p>DE</text:p>
            </table:table-cell>
            <table:table-cell office:value-type="float" office:value="13"/>
            <table:table-cell office:value-type="float" office:value="0.18571428571428572"/>
          </table:table-row>
          <table:table-row>
            <table:table-cell office:value-type="string">
              <text:p>UK</text:p>
            </table:table-cell>
            <table:table-cell office:value-type="float" office:value="12"/>
            <table:table-cell office:value-type="float" office:value="0.17142857142857143"/>
          </table:table-row>
          <table:table-row>
            <table:table-cell office:value-type="string">
              <text:p>FR</text:p>
            </table:table-cell>
            <table:table-cell office:value-type="float" office:value="11"/>
            <table:table-cell office:value-type="float" office:value="0.1571428571428571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10.25pt" svg:width="253.5pt" chart:style-name="Crt0">
        <chart:title svg:x="27.41pt" svg:y="6.0pt" chart:style-name="CT00">
          <text:p text:style-name="a0" text:class-names="" text:cond-style-name="">Number/Ratio of Members by Subscription Type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/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ay user_id</text:p>
              </table:table-cell>
              <table:table-cell office:value-type="string">
                <text:p>Say user_id2</text:p>
              </table:table-cell>
            </table:table-row>
          </table:table-header-rows>
          <table:table-row>
            <table:table-cell office:value-type="string">
              <text:p>free</text:p>
            </table:table-cell>
            <table:table-cell office:value-type="float" office:value="35"/>
            <table:table-cell office:value-type="float" office:value="0.5"/>
          </table:table-row>
          <table:table-row>
            <table:table-cell office:value-type="string">
              <text:p>premium</text:p>
            </table:table-cell>
            <table:table-cell office:value-type="float" office:value="35"/>
            <table:table-cell office:value-type="float" office:value="0.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152.25pt" svg:width="258.75pt" chart:style-name="Crt0">
        <chart:title chart:style-name="CT00">
          <text:p text:style-name="a0" text:class-names="" text:cond-style-name="">Average Daily Listening Time by Favorite Music Genre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/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plam</text:p>
              </table:table-cell>
            </table:table-row>
          </table:table-header-rows>
          <table:table-row>
            <table:table-cell office:value-type="string">
              <text:p>jazz</text:p>
            </table:table-cell>
            <table:table-cell office:value-type="float" office:value="145.41666666666666"/>
          </table:table-row>
          <table:table-row>
            <table:table-cell office:value-type="string">
              <text:p>classical</text:p>
            </table:table-cell>
            <table:table-cell office:value-type="float" office:value="140.5"/>
          </table:table-row>
          <table:table-row>
            <table:table-cell office:value-type="string">
              <text:p>rock</text:p>
            </table:table-cell>
            <table:table-cell office:value-type="float" office:value="117.30769230769231"/>
          </table:table-row>
          <table:table-row>
            <table:table-cell office:value-type="string">
              <text:p>pop</text:p>
            </table:table-cell>
            <table:table-cell office:value-type="float" office:value="56.904761904761905"/>
          </table:table-row>
          <table:table-row>
            <table:table-cell office:value-type="string">
              <text:p>hiphop</text:p>
            </table:table-cell>
            <table:table-cell office:value-type="float" office:value="33.14285714285714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82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121.5pt" svg:width="262.5pt" chart:style-name="Crt0">
        <chart:title chart:style-name="CT00">
          <text:p text:style-name="a0" text:class-names="" text:cond-style-name="">Average Daily Listening Time by Subscription Type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/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plam</text:p>
              </table:table-cell>
            </table:table-row>
          </table:table-header-rows>
          <table:table-row>
            <table:table-cell office:value-type="string">
              <text:p>premium</text:p>
            </table:table-cell>
            <table:table-cell office:value-type="float" office:value="135.71428571428572"/>
          </table:table-row>
          <table:table-row>
            <table:table-cell office:value-type="string">
              <text:p>free</text:p>
            </table:table-cell>
            <table:table-cell office:value-type="float" office:value="45.2571428571428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51.5pt" svg:width="254.25pt" chart:style-name="Crt0">
        <chart:title chart:style-name="CT00">
          <text:p text:style-name="a0" text:class-names="" text:cond-style-name="">Churn Rate by Age Group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/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ay user_id</text:p>
              </table:table-cell>
              <table:table-cell office:value-type="string">
                <text:p>Total churned</text:p>
              </table:table-cell>
            </table:table-row>
          </table:table-header-rows>
          <table:table-row>
            <table:table-cell office:value-type="string">
              <text:p>18-24</text:p>
            </table:table-cell>
            <table:table-cell office:value-type="float" office:value="15"/>
            <table:table-cell office:value-type="float" office:value="0.41935483870967744"/>
          </table:table-row>
          <table:table-row>
            <table:table-cell office:value-type="string">
              <text:p>25-34</text:p>
            </table:table-cell>
            <table:table-cell office:value-type="float" office:value="29"/>
            <table:table-cell office:value-type="float" office:value="0.54838709677419351"/>
          </table:table-row>
          <table:table-row>
            <table:table-cell office:value-type="string">
              <text:p>35+</text:p>
            </table:table-cell>
            <table:table-cell office:value-type="float" office:value="26"/>
            <table:table-cell office:value-type="float" office:value="3.2258064516129031E-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